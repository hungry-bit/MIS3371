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15EF88D6C1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fd095"/>
    </style:style>
    <style:style style:name="gr1" style:family="graphic" style:parent-style-name="standard">
      <style:graphic-properties svg:stroke-color="#127622" draw:fill="solid" draw:fill-color="#dde8cb" draw:textarea-vertical-align="middle" draw:auto-grow-height="false" fo:min-height="3.532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3.94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0.77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2.04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7.602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385cm" fo:min-width="2.561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1.30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4.845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9.57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046cm" fo:min-width="0cm" loext:decorative="false"/>
    </style:style>
    <style:style style:name="gr15" style:family="graphic" style:parent-style-name="standard">
      <style:graphic-properties draw:fill="solid" draw:fill-color="#b4c7dc" draw:textarea-horizontal-align="justify" draw:textarea-vertical-align="middle" draw:auto-grow-height="false" fo:min-height="0.385cm" fo:min-width="0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385cm" fo:min-width="14.922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0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85cm" fo:min-width="3.171cm" loext:decorative="false"/>
    </style:style>
    <style:style style:name="gr20" style:family="graphic" style:parent-style-name="standard">
      <style:graphic-properties draw:textarea-vertical-align="middle" draw:auto-grow-height="false" fo:min-height="0.493cm" fo:min-width="0.221cm" loext:decorative="false"/>
    </style:style>
    <style:style style:name="gr21" style:family="graphic" style:parent-style-name="standard">
      <style:graphic-properties draw:fill="solid" draw:fill-color="#b4c7dc" draw:textarea-vertical-align="middle" draw:auto-grow-height="false" fo:min-height="0.335cm" fo:min-width="0.084cm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dash" draw:stroke-dash="Dash" svg:stroke-width="0.053cm" draw:marker-start="Arrowheads_20_1" draw:marker-start-width="0.279cm" draw:marker-end="Arrowheads_20_1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="none" draw:fill-color="#ffffff"/>
      <style:paragraph-properties fo:text-align="center"/>
      <style:text-properties fo:font-size="11pt"/>
    </style:style>
    <style:style style:name="P15" style:family="paragraph">
      <loext:graphic-properties draw:fill="none" draw:fill-color="#ffffff"/>
      <style:paragraph-properties fo:text-align="center"/>
      <style:text-properties fo:font-size="11pt" style:font-size-asian="12pt" style:font-size-complex="12pt"/>
    </style:style>
    <style:style style:name="P16" style:family="paragraph">
      <style:text-properties fo:font-size="11pt"/>
    </style:style>
    <style:style style:name="P17" style:family="paragraph">
      <loext:graphic-properties draw:fill="none" draw:fill-color="#ffffff"/>
      <style:text-properties fo:font-size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3.78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05cm" svg:height="1.119cm" svg:x="0.524cm" svg:y="4.33cm">
          <draw:text-box>
            <text:p text:style-name="P2"><text:span text:style-name="T1">New Patient Registration Form</text:span></text:p>
          </draw:text-box>
        </draw:frame>
        <draw:frame draw:style-name="gr3" draw:text-style-name="P5" draw:layer="layout" svg:width="10.231cm" svg:height="1.673cm" svg:x="0.253cm" svg:y="2.961cm">
          <draw:text-box>
            <text:p text:style-name="P4">Date: MM/DD/YYYY 12:00 AM</text:p>
          </draw:text-box>
        </draw:frame>
        <draw:custom-shape draw:style-name="gr4" draw:text-style-name="P7" draw:layer="layout" svg:width="19.685cm" svg:height="0.878cm" svg:x="0.147cm" svg:y="5.488cm">
          <text:p text:style-name="P6"><text:span text:style-name="T2">Patient In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635cm" svg:x="0.465cm" svg:y="6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635cm" svg:x="8.085cm" svg:y="6.8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635cm" svg:x="5.862cm" svg:y="6.8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0.635cm" svg:x="13.482cm" svg:y="6.8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0.635cm" svg:x="16.975cm" svg:y="6.87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81cm" svg:height="0.725cm" svg:x="0.465cm" svg:y="7.514cm">
          <draw:text-box>
            <text:p text:style-name="P8">First Name</text:p>
          </draw:text-box>
        </draw:frame>
        <draw:frame draw:style-name="gr2" draw:text-style-name="P9" draw:layer="layout" svg:width="3.067cm" svg:height="0.725cm" svg:x="5.048cm" svg:y="7.449cm">
          <draw:text-box>
            <text:p text:style-name="P8">Middle Initials</text:p>
          </draw:text-box>
        </draw:frame>
        <draw:frame draw:style-name="gr2" draw:text-style-name="P9" draw:layer="layout" svg:width="2.549cm" svg:height="0.725cm" svg:x="9.099cm" svg:y="7.476cm">
          <draw:text-box>
            <text:p text:style-name="P8">Last Name</text:p>
          </draw:text-box>
        </draw:frame>
        <draw:frame draw:style-name="gr2" draw:text-style-name="P9" draw:layer="layout" svg:width="1.231cm" svg:height="0.725cm" svg:x="13.427cm" svg:y="7.45cm">
          <draw:text-box draw:corner-radius="0.146cm">
            <text:p text:style-name="P8">Sex</text:p>
          </draw:text-box>
        </draw:frame>
        <draw:frame draw:style-name="gr2" draw:text-style-name="P9" draw:layer="layout" svg:width="2.855cm" svg:height="0.725cm" svg:x="16.834cm" svg:y="7.424cm">
          <draw:text-box>
            <text:p text:style-name="P8">Date of Birth</text:p>
          </draw:text-box>
        </draw:frame>
        <draw:custom-shape draw:style-name="gr9" draw:text-style-name="P6" draw:layer="layout" svg:width="8.102cm" svg:height="0.635cm" svg:x="0.515cm" svg:y="8.4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635cm" svg:x="9.696cm" svg:y="8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1cm" svg:height="0.635cm" svg:x="14.451cm" svg:y="8.4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808cm" svg:height="0.635cm" svg:x="17.945cm" svg:y="8.45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.055cm" svg:height="0.725cm" svg:x="0.43cm" svg:y="9.078cm">
          <draw:text-box>
            <text:p text:style-name="P8">Address</text:p>
          </draw:text-box>
        </draw:frame>
        <draw:frame draw:style-name="gr2" draw:text-style-name="P9" draw:layer="layout" svg:width="1.231cm" svg:height="0.725cm" svg:x="9.852cm" svg:y="9.175cm">
          <draw:text-box>
            <text:p text:style-name="P8">City</text:p>
          </draw:text-box>
        </draw:frame>
        <draw:frame draw:style-name="gr2" draw:text-style-name="P10" draw:layer="layout" svg:width="1.49cm" svg:height="0.725cm" svg:x="14.574cm" svg:y="9.249cm">
          <draw:text-box>
            <text:p><text:span text:style-name="T3">State</text:span></text:p>
          </draw:text-box>
        </draw:frame>
        <draw:frame draw:style-name="gr2" draw:text-style-name="P10" draw:layer="layout" svg:width="1.161cm" svg:height="0.725cm" svg:x="18.104cm" svg:y="9.294cm">
          <draw:text-box>
            <text:p><text:span text:style-name="T3">ZIP</text:span></text:p>
          </draw:text-box>
        </draw:frame>
        <draw:custom-shape draw:style-name="gr12" draw:text-style-name="P6" draw:layer="layout" svg:width="5.345cm" svg:height="0.635cm" svg:x="0.515cm" svg:y="9.992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3.349cm" svg:height="0.725cm" svg:x="0.551cm" svg:y="10.683cm">
          <draw:text-box>
            <text:p><text:span text:style-name="T3">Phone Number</text:span></text:p>
          </draw:text-box>
        </draw:frame>
        <draw:frame draw:style-name="gr2" draw:text-style-name="P10" draw:layer="layout" svg:width="3.208cm" svg:height="0.725cm" svg:x="7.316cm" svg:y="10.752cm">
          <draw:text-box>
            <text:p><text:span text:style-name="T3">Email Address</text:span></text:p>
          </draw:text-box>
        </draw:frame>
        <draw:custom-shape draw:style-name="gr5" draw:text-style-name="P6" draw:layer="layout" svg:width="4.445cm" svg:height="0.635cm" svg:x="0.466cm" svg:y="6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0.07cm" svg:height="0.635cm" svg:x="6.841cm" svg:y="10.08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3.208cm" svg:height="0.725cm" svg:x="0.585cm" svg:y="11.592cm">
          <draw:text-box>
            <text:p><text:span text:style-name="T3">Marital Status:</text:span></text:p>
          </draw:text-box>
        </draw:frame>
        <draw:custom-shape draw:style-name="gr14" draw:text-style-name="P6" draw:layer="layout" svg:width="0.418cm" svg:height="0.418cm" svg:x="4.704cm" svg:y="11.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custom-shape draw:style-name="gr14" draw:text-style-name="P6" draw:layer="layout" svg:width="0.418cm" svg:height="0.418cm" svg:x="7.166cm" svg:y="11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frame draw:style-name="gr2" draw:text-style-name="P11" draw:layer="layout" svg:width="1.822cm" svg:height="0.683cm" svg:x="3.99cm" svg:y="12.2cm">
          <draw:text-box>
            <text:p><text:span text:style-name="T4">Married</text:span></text:p>
          </draw:text-box>
        </draw:frame>
        <draw:frame draw:style-name="gr2" draw:text-style-name="P11" draw:layer="layout" svg:width="2.32cm" svg:height="0.683cm" svg:x="6.249cm" svg:y="12.223cm">
          <draw:text-box>
            <text:p><text:span text:style-name="T4">Unmarried</text:span></text:p>
          </draw:text-box>
        </draw:frame>
        <draw:custom-shape draw:style-name="gr5" draw:text-style-name="P6" draw:layer="layout" svg:width="4.445cm" svg:height="0.635cm" svg:x="10.214cm" svg:y="11.606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925cm" svg:height="0.725cm" svg:x="9.999cm" svg:y="12.297cm">
          <draw:text-box>
            <text:p><text:span text:style-name="T3">Social Security Number</text:span></text:p>
          </draw:text-box>
        </draw:frame>
        <draw:custom-shape draw:style-name="gr15" draw:text-style-name="P12" draw:layer="layout" svg:width="0.43cm" svg:height="0.635cm" svg:x="17.084cm" svg:y="8.4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438cm" svg:height="0.303cm" svg:x="17.066cm" svg:y="8.63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2" draw:text-style-name="P10" draw:layer="layout" svg:width="3.537cm" svg:height="0.725cm" svg:x="0.479cm" svg:y="13.236cm">
          <draw:text-box>
            <text:p><text:span text:style-name="T3">Reason for visit:</text:span></text:p>
          </draw:text-box>
        </draw:frame>
        <draw:custom-shape draw:style-name="gr17" draw:text-style-name="P6" draw:layer="layout" svg:width="15.422cm" svg:height="0.635cm" svg:x="4.221cm" svg:y="13.315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901cm" svg:height="0.725cm" svg:x="20.405cm" svg:y="5.617cm">
          <draw:text-box>
            <text:p><text:span text:style-name="T3">New UserID:</text:span></text:p>
          </draw:text-box>
        </draw:frame>
        <draw:frame draw:style-name="gr2" draw:text-style-name="P10" draw:layer="layout" svg:width="2.478cm" svg:height="0.725cm" svg:x="20.378cm" svg:y="6.492cm">
          <draw:text-box>
            <text:p><text:span text:style-name="T3">Password:</text:span></text:p>
          </draw:text-box>
        </draw:frame>
        <draw:frame draw:style-name="gr18" draw:text-style-name="P10" draw:layer="layout" svg:width="4.125cm" svg:height="1.412cm" svg:x="20.348cm" svg:y="7.31cm">
          <draw:text-box>
            <text:p><text:span text:style-name="T3">Re-enter </text:span></text:p>
            <text:p><text:span text:style-name="T3">Password:</text:span></text:p>
          </draw:text-box>
        </draw:frame>
        <draw:custom-shape draw:style-name="gr19" draw:text-style-name="P6" draw:layer="layout" svg:width="3.671cm" svg:height="0.635cm" svg:x="23.734cm" svg:y="5.6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671cm" svg:height="0.635cm" svg:x="23.734cm" svg:y="6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671cm" svg:height="0.635cm" svg:x="23.763cm" svg:y="7.616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5.044cm" svg:height="0.725cm" svg:x="0.45cm" svg:y="14.479cm">
          <draw:text-box>
            <text:p><text:span text:style-name="T3">Do you suffer for any previous medical afflictions? Please check all that apply.</text:span></text:p>
          </draw:text-box>
        </draw:frame>
        <draw:frame draw:style-name="gr2" draw:text-style-name="P10" draw:layer="layout" svg:width="2.125cm" svg:height="0.725cm" svg:x="0.677cm" svg:y="15.269cm">
          <draw:text-box>
            <text:p><text:span text:style-name="T3">Allergies</text:span></text:p>
          </draw:text-box>
        </draw:frame>
        <draw:custom-shape draw:style-name="gr20" draw:text-style-name="P6" draw:layer="layout" svg:width="0.721cm" svg:height="0.743cm" svg:x="2.805cm" svg:y="15.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584cm" svg:height="0.585cm" svg:x="2.87cm" svg:y="15.304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.937cm" svg:height="0.725cm" svg:x="3.796cm" svg:y="15.293cm">
          <draw:text-box>
            <text:p><text:span text:style-name="T3">Asthma</text:span></text:p>
          </draw:text-box>
        </draw:frame>
        <draw:custom-shape draw:style-name="gr20" draw:text-style-name="P6" draw:layer="layout" svg:width="0.721cm" svg:height="0.743cm" svg:x="5.756cm" svg:y="15.2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584cm" svg:height="0.585cm" svg:x="5.821cm" svg:y="15.332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3.184cm" svg:height="0.725cm" svg:x="6.747cm" svg:y="15.24cm">
          <draw:text-box>
            <text:p><text:span text:style-name="T3">Heart Disease</text:span></text:p>
          </draw:text-box>
        </draw:frame>
        <draw:custom-shape draw:style-name="gr20" draw:text-style-name="P6" draw:layer="layout" svg:width="0.721cm" svg:height="0.743cm" svg:x="9.843cm" svg:y="15.2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584cm" svg:height="0.585cm" svg:x="9.908cm" svg:y="15.344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3.091cm" svg:height="0.725cm" svg:x="10.781cm" svg:y="15.253cm">
          <draw:text-box>
            <text:p><text:span text:style-name="T3">Lung Disease</text:span></text:p>
          </draw:text-box>
        </draw:frame>
        <draw:custom-shape draw:style-name="gr20" draw:text-style-name="P6" draw:layer="layout" svg:width="0.721cm" svg:height="0.743cm" svg:x="13.733cm" svg:y="15.2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584cm" svg:height="0.585cm" svg:x="13.798cm" svg:y="15.291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3.067cm" svg:height="0.725cm" svg:x="14.644cm" svg:y="15.28cm">
          <draw:text-box>
            <text:p><text:span text:style-name="T3">Liver Disease</text:span></text:p>
          </draw:text-box>
        </draw:frame>
        <draw:custom-shape draw:style-name="gr20" draw:text-style-name="P6" draw:layer="layout" svg:width="0.721cm" svg:height="0.743cm" svg:x="17.635cm" svg:y="15.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584cm" svg:height="0.585cm" svg:x="17.7cm" svg:y="15.304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479cm" svg:height="0.725cm" svg:x="15.187cm" svg:y="11.589cm">
          <draw:text-box>
            <text:p><text:span text:style-name="T3">Insurance:</text:span></text:p>
          </draw:text-box>
        </draw:frame>
        <draw:custom-shape draw:style-name="gr14" draw:text-style-name="P6" draw:layer="layout" svg:width="0.418cm" svg:height="0.418cm" svg:x="17.748cm" svg:y="11.24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custom-shape draw:style-name="gr14" draw:text-style-name="P6" draw:layer="layout" svg:width="0.418cm" svg:height="0.418cm" svg:x="17.748cm" svg:y="11.8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frame draw:style-name="gr2" draw:text-style-name="P11" draw:layer="layout" svg:width="1.137cm" svg:height="0.683cm" svg:x="18.229cm" svg:y="11.113cm">
          <draw:text-box>
            <text:p><text:span text:style-name="T4">Yes</text:span></text:p>
          </draw:text-box>
        </draw:frame>
        <draw:frame draw:style-name="gr2" draw:text-style-name="P11" draw:layer="layout" svg:width="1cm" svg:height="0.683cm" svg:x="18.256cm" svg:y="11.695cm">
          <draw:text-box>
            <text:p><text:span text:style-name="T4">No</text:span></text:p>
          </draw:text-box>
        </draw:frame>
        <draw:frame draw:style-name="gr22" draw:text-style-name="P6" draw:layer="layout" svg:width="7.407cm" svg:height="7.407cm" svg:x="-1.43cm" svg:y="-2.196cm">
          <draw:image xlink:href="Pictures/100000010000015E0000015EF88D6C15.png" xlink:type="simple" xlink:show="embed" xlink:actuate="onLoad" draw:mime-type="image/png">
            <text:p/>
          </draw:image>
        </draw:frame>
        <draw:frame draw:style-name="gr2" draw:text-style-name="P9" draw:layer="layout" svg:width="5.891cm" svg:height="1.199cm" svg:x="0.741cm" svg:y="16.775cm">
          <draw:text-box>
            <text:p text:style-name="P8">On a scale of 1-10, </text:p>
            <text:p text:style-name="P8">how urgent is your situation?</text:p>
          </draw:text-box>
        </draw:frame>
        <draw:line draw:style-name="gr23" draw:text-style-name="P6" draw:layer="layout" svg:x1="7.274cm" svg:y1="17.21cm" svg:x2="19.646cm" svg:y2="17.21cm">
          <text:p/>
        </draw:line>
        <draw:frame draw:style-name="gr24" draw:text-style-name="P14" draw:layer="layout" svg:width="2.45cm" svg:height="1.115cm" svg:x="6.246cm" svg:y="17.453cm">
          <draw:text-box>
            <text:p text:style-name="P13">0<text:line-break/>I could wait</text:p>
          </draw:text-box>
        </draw:frame>
        <draw:frame draw:style-name="gr24" draw:text-style-name="P11" draw:layer="layout" svg:width="3.49cm" svg:height="1.115cm" svg:x="17.775cm" svg:y="17.414cm">
          <draw:text-box>
            <text:p text:style-name="P6"><text:span text:style-name="T4">10</text:span><text:span text:style-name="T4"><text:line-break/></text:span><text:span text:style-name="T4">I am bleeding out</text:span></text:p>
          </draw:text-box>
        </draw:frame>
        <draw:frame draw:style-name="gr24" draw:text-style-name="P15" draw:layer="layout" svg:width="5.157cm" svg:height="1.547cm" svg:x="11.21cm" svg:y="17.279cm">
          <draw:text-box>
            <text:p text:style-name="P13"><text:span text:style-name="T5">5</text:span></text:p>
            <text:p text:style-name="P13"><text:span text:style-name="T5">I’m in pain </text:span></text:p>
            <text:p text:style-name="P13"><text:span text:style-name="T5">but that guy is bleeding out</text:span></text:p>
          </draw:text-box>
        </draw:frame>
        <draw:frame draw:style-name="gr2" draw:text-style-name="P9" draw:layer="layout" svg:width="5.867cm" svg:height="0.725cm" svg:x="0.804cm" svg:y="19.22cm">
          <draw:text-box>
            <text:p text:style-name="P8">Preferred method of contact:</text:p>
          </draw:text-box>
        </draw:frame>
        <draw:frame draw:style-name="gr2" draw:text-style-name="P11" draw:layer="layout" svg:width="2.407cm" svg:height="0.683cm" svg:x="6.752cm" svg:y="19.22cm">
          <draw:text-box>
            <text:p><text:span text:style-name="T4">Phone Call</text:span></text:p>
          </draw:text-box>
        </draw:frame>
        <draw:custom-shape draw:style-name="gr14" draw:text-style-name="P6" draw:layer="layout" svg:width="0.418cm" svg:height="0.418cm" svg:x="9.107cm" svg:y="19.34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frame draw:style-name="gr2" draw:text-style-name="P11" draw:layer="layout" svg:width="2.905cm" svg:height="0.683cm" svg:x="9.991cm" svg:y="19.284cm">
          <draw:text-box>
            <text:p><text:span text:style-name="T4">Text Message</text:span></text:p>
          </draw:text-box>
        </draw:frame>
        <draw:custom-shape draw:style-name="gr14" draw:text-style-name="P6" draw:layer="layout" svg:width="0.418cm" svg:height="0.418cm" svg:x="12.811cm" svg:y="19.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  <draw:frame draw:style-name="gr2" draw:text-style-name="P17" draw:layer="layout" svg:width="1.476cm" svg:height="0.683cm" svg:x="13.99cm" svg:y="19.304cm">
          <draw:text-box>
            <text:p text:style-name="P16">Email</text:p>
          </draw:text-box>
        </draw:frame>
        <draw:custom-shape draw:style-name="gr14" draw:text-style-name="P6" draw:layer="layout" svg:width="0.418cm" svg:height="0.418cm" svg:x="15.393cm" svg:y="19.34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position-x="$0" draw:handle-position-y="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0T23:52:04.957395500</meta:creation-date>
    <dc:date>2026-06-21T02:12:39.316589500</dc:date>
    <meta:editing-duration>PT10M26S</meta:editing-duration>
    <meta:editing-cycles>1</meta:editing-cycles>
    <meta:document-statistic meta:object-count="78"/>
    <meta:generator>LibreOffice/26.2.4.2$Windows_X86_64 LibreOffice_project/0229ac93fcf0d7cbc6376066c6f35021cef002dc</meta:generator>
  </office:meta>
</office:document-meta>
</file>