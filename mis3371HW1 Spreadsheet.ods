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var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eCreate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ientFNam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ientLNam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ientMI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Security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ressLine1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ressLine2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tyInput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nde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ccinated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suranc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ID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ssword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sswordHashe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italStatus</text:p>
          </table:table-cell>
          <table:table-cell table:number-columns-repeated="5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14:15:53.24889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23:51:57.543066600</meta:creation-date>
    <dc:date>2026-06-23T21:06:06.940927200</dc:date>
    <meta:editing-duration>P1DT6H6M47S</meta:editing-duration>
    <meta:editing-cycles>4</meta:editing-cycles>
    <meta:generator>LibreOffice/26.2.4.2$Windows_X86_64 LibreOffice_project/0229ac93fcf0d7cbc6376066c6f35021cef002dc</meta:generator>
    <meta:document-statistic meta:table-count="1" meta:cell-count="63" meta:object-count="0"/>
  </office:meta>
</office:document-meta>
</file>